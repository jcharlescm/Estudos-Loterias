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17" calcext:value-type="float">
            <text:p>3717</text:p>
          </table:table-cell>
          <table:table-cell table:style-name="ce272" office:value-type="float" office:value="3718" calcext:value-type="float">
            <text:p>3718</text:p>
          </table:table-cell>
          <table:table-cell table:style-name="ce272" office:value-type="float" office:value="3719" calcext:value-type="float">
            <text:p>3719</text:p>
          </table:table-cell>
          <table:table-cell table:style-name="ce272" office:value-type="float" office:value="3720" calcext:value-type="float">
            <text:p>3720</text:p>
          </table:table-cell>
          <table:table-cell table:style-name="ce272" office:value-type="float" office:value="3721" calcext:value-type="float">
            <text:p>3721</text:p>
          </table:table-cell>
          <table:table-cell table:style-name="ce272" office:value-type="float" office:value="3722" calcext:value-type="float">
            <text:p>3722</text:p>
          </table:table-cell>
          <table:table-cell table:style-name="ce272" office:value-type="float" office:value="3723" calcext:value-type="float">
            <text:p>3723</text:p>
          </table:table-cell>
          <table:table-cell table:style-name="ce272" office:value-type="float" office:value="3724" calcext:value-type="float">
            <text:p>3724</text:p>
          </table:table-cell>
          <table:table-cell table:style-name="ce272" office:value-type="float" office:value="3725" calcext:value-type="float">
            <text:p>3725</text:p>
          </table:table-cell>
          <table:table-cell table:style-name="ce272" office:value-type="float" office:value="3726" calcext:value-type="float">
            <text:p>3726</text:p>
          </table:table-cell>
          <table:table-cell table:style-name="ce272" office:value-type="float" office:value="3727" calcext:value-type="float">
            <text:p>3727</text:p>
          </table:table-cell>
          <table:table-cell table:style-name="ce272" office:value-type="float" office:value="3728" calcext:value-type="float">
            <text:p>3728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3:.M3])/12" office:value-type="float" office:value="0.666666666666667" calcext:value-type="float">
            <text:p>0,67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666666666666667" calcext:value-type="float">
            <text:p>0,67</text:p>
          </table:table-cell>
          <table:table-cell table:style-name="ce290" table:formula="of:=((([.Q3]+1)*1.618)-(([.R3]+1)*1.618))/[.N3]" office:value-type="float" office:value="4.854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style-name="ce60" table:formula="of:=SUM([.B4:.M4])/12" office:value-type="float" office:value="0.75" calcext:value-type="float">
            <text:p>0,75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7" calcext:value-type="float">
            <text:p>7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75" calcext:value-type="float">
            <text:p>0,75</text:p>
          </table:table-cell>
          <table:table-cell table:style-name="ce290" table:formula="of:=((([.Q4]+1)*1.618)-(([.R4]+1)*1.618))/[.N4]" office:value-type="float" office:value="15.1013333333333" calcext:value-type="float">
            <text:p>15,1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5:.M5])/12" office:value-type="float" office:value="0.5" calcext:value-type="float">
            <text:p>0,50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" calcext:value-type="float">
            <text:p>0,50</text:p>
          </table:table-cell>
          <table:table-cell table:style-name="ce290" table:formula="of:=((([.Q5]+1)*1.618)-(([.R5]+1)*1.618))/[.N5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6:.M6])/12" office:value-type="float" office:value="0.5" calcext:value-type="float">
            <text:p>0,50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6]" office:value-type="float" office:value="0.5" calcext:value-type="float">
            <text:p>0,50</text:p>
          </table:table-cell>
          <table:table-cell table:style-name="ce290" table:formula="of:=((([.Q6]+1)*1.618)-(([.R6]+1)*1.618))/[.N6]" office:value-type="float" office:value="-3.236" calcext:value-type="float">
            <text:p>-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8" table:style-name="ce273" office:value-type="float" office:value="1" calcext:value-type="float">
            <text:p>1</text:p>
          </table:table-cell>
          <table:table-cell table:style-name="ce60" table:formula="of:=SUM([.B7:.M7])/12" office:value-type="float" office:value="0.916666666666667" calcext:value-type="float">
            <text:p>0,92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9" calcext:value-type="float">
            <text:p>9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916666666666667" calcext:value-type="float">
            <text:p>0,92</text:p>
          </table:table-cell>
          <table:table-cell table:style-name="ce290" table:formula="of:=((([.Q7]+1)*1.618)-(([.R7]+1)*1.618))/[.N7]" office:value-type="float" office:value="15.8858181818182" calcext:value-type="float">
            <text:p>15,8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8:.M8])/12" office:value-type="float" office:value="0.583333333333333" calcext:value-type="float">
            <text:p>0,58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583333333333333" calcext:value-type="float">
            <text:p>0,58</text:p>
          </table:table-cell>
          <table:table-cell table:style-name="ce290" table:formula="of:=((([.Q8]+1)*1.618)-(([.R8]+1)*1.618))/[.N8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9:.M9])/12" office:value-type="float" office:value="0.666666666666667" calcext:value-type="float">
            <text:p>0,67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9]" office:value-type="float" office:value="0.666666666666667" calcext:value-type="float">
            <text:p>0,67</text:p>
          </table:table-cell>
          <table:table-cell table:style-name="ce290" table:formula="of:=((([.Q9]+1)*1.618)-(([.R9]+1)*1.618))/[.N9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10:.M10])/12" office:value-type="float" office:value="0.416666666666667" calcext:value-type="float">
            <text:p>0,42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0]" office:value-type="float" office:value="0.416666666666667" calcext:value-type="float">
            <text:p>0,42</text:p>
          </table:table-cell>
          <table:table-cell table:style-name="ce290" table:formula="of:=((([.Q10]+1)*1.618)-(([.R10]+1)*1.618))/[.N10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11:.M11])/12" office:value-type="float" office:value="0.416666666666667" calcext:value-type="float">
            <text:p>0,42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1]" office:value-type="float" office:value="0.416666666666667" calcext:value-type="float">
            <text:p>0,42</text:p>
          </table:table-cell>
          <table:table-cell table:style-name="ce290" table:formula="of:=((([.Q11]+1)*1.618)-(([.R11]+1)*1.618))/[.N11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12:.M12])/12" office:value-type="float" office:value="0.666666666666667" calcext:value-type="float">
            <text:p>0,67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2]" office:value-type="float" office:value="0.666666666666667" calcext:value-type="float">
            <text:p>0,67</text:p>
          </table:table-cell>
          <table:table-cell table:style-name="ce290" table:formula="of:=((([.Q12]+1)*1.618)-(([.R12]+1)*1.618))/[.N12]" office:value-type="float" office:value="-2.427" calcext:value-type="float">
            <text:p>-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13:.M13])/12" office:value-type="float" office:value="0.75" calcext:value-type="float">
            <text:p>0,75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75" calcext:value-type="float">
            <text:p>0,75</text:p>
          </table:table-cell>
          <table:table-cell table:style-name="ce290" table:formula="of:=((([.Q13]+1)*1.618)-(([.R13]+1)*1.618))/[.N13]" office:value-type="float" office:value="4.31466666666667" calcext:value-type="float">
            <text:p>4,3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60" table:formula="of:=SUM([.B14:.M14])/12" office:value-type="float" office:value="0.5" calcext:value-type="float">
            <text:p>0,50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4" calcext:value-type="float">
            <text:p>4,00</text:p>
          </table:table-cell>
          <table:table-cell table:style-name="ce287" table:formula="of:=[.N14]" office:value-type="float" office:value="0.5" calcext:value-type="float">
            <text:p>0,50</text:p>
          </table:table-cell>
          <table:table-cell table:style-name="ce290" table:formula="of:=((([.Q14]+1)*1.618)-(([.R14]+1)*1.618))/[.N14]" office:value-type="float" office:value="-12.944" calcext:value-type="float">
            <text:p>-12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15:.M15])/12" office:value-type="float" office:value="0.416666666666667" calcext:value-type="float">
            <text:p>0,42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5]" office:value-type="float" office:value="0.416666666666667" calcext:value-type="float">
            <text:p>0,42</text:p>
          </table:table-cell>
          <table:table-cell table:style-name="ce290" table:formula="of:=((([.Q15]+1)*1.618)-(([.R15]+1)*1.618))/[.N15]" office:value-type="float" office:value="-3.8832" calcext:value-type="float">
            <text:p>-3,88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16:.M16])/12" office:value-type="float" office:value="0.666666666666667" calcext:value-type="float">
            <text:p>0,67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6]" office:value-type="float" office:value="0.666666666666667" calcext:value-type="float">
            <text:p>0,67</text:p>
          </table:table-cell>
          <table:table-cell table:style-name="ce290" table:formula="of:=((([.Q16]+1)*1.618)-(([.R16]+1)*1.618))/[.N16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60" table:formula="of:=SUM([.B17:.M17])/12" office:value-type="float" office:value="0.583333333333333" calcext:value-type="float">
            <text:p>0,58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4" calcext:value-type="float">
            <text:p>4,00</text:p>
          </table:table-cell>
          <table:table-cell table:style-name="ce287" table:formula="of:=[.N17]" office:value-type="float" office:value="0.583333333333333" calcext:value-type="float">
            <text:p>0,58</text:p>
          </table:table-cell>
          <table:table-cell table:style-name="ce290" table:formula="of:=((([.Q17]+1)*1.618)-(([.R17]+1)*1.618))/[.N17]" office:value-type="float" office:value="-11.0948571428571" calcext:value-type="float">
            <text:p>-11,09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18:.M18])/12" office:value-type="float" office:value="0.5" calcext:value-type="float">
            <text:p>0,50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5" calcext:value-type="float">
            <text:p>0,50</text:p>
          </table:table-cell>
          <table:table-cell table:style-name="ce290" table:formula="of:=((([.Q18]+1)*1.618)-(([.R18]+1)*1.618))/[.N18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19:.M19])/12" office:value-type="float" office:value="0.75" calcext:value-type="float">
            <text:p>0,75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9]" office:value-type="float" office:value="0.75" calcext:value-type="float">
            <text:p>0,75</text:p>
          </table:table-cell>
          <table:table-cell table:style-name="ce290" table:formula="of:=((([.Q19]+1)*1.618)-(([.R19]+1)*1.618))/[.N19]" office:value-type="float" office:value="2.15733333333333" calcext:value-type="float">
            <text:p>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0" table:formula="of:=SUM([.B20:.M20])/12" office:value-type="float" office:value="0.583333333333333" calcext:value-type="float">
            <text:p>0,58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0]" office:value-type="float" office:value="0.583333333333333" calcext:value-type="float">
            <text:p>0,58</text:p>
          </table:table-cell>
          <table:table-cell table:style-name="ce290" table:formula="of:=((([.Q20]+1)*1.618)-(([.R20]+1)*1.618))/[.N20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style-name="ce60" table:formula="of:=SUM([.B21:.M21])/12" office:value-type="float" office:value="0.75" calcext:value-type="float">
            <text:p>0,75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7" calcext:value-type="float">
            <text:p>7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75" calcext:value-type="float">
            <text:p>0,75</text:p>
          </table:table-cell>
          <table:table-cell table:style-name="ce290" table:formula="of:=((([.Q21]+1)*1.618)-(([.R21]+1)*1.618))/[.N21]" office:value-type="float" office:value="15.1013333333333" calcext:value-type="float">
            <text:p>15,10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0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-5.54742857142857" calcext:value-type="float">
            <text:p>-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0" table:formula="of:=SUM([.B24:.M24])/12" office:value-type="float" office:value="0.666666666666667" calcext:value-type="float">
            <text:p>0,67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666666666666667" calcext:value-type="float">
            <text:p>0,67</text:p>
          </table:table-cell>
          <table:table-cell table:style-name="ce290" table:formula="of:=((([.Q24]+1)*1.618)-(([.R24]+1)*1.618))/[.N24]" office:value-type="float" office:value="7.281" calcext:value-type="float">
            <text:p>7,2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0" table:formula="of:=SUM([.B26:.M26])/12" office:value-type="float" office:value="0.416666666666667" calcext:value-type="float">
            <text:p>0,42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6]" office:value-type="float" office:value="0.416666666666667" calcext:value-type="float">
            <text:p>0,42</text:p>
          </table:table-cell>
          <table:table-cell table:style-name="ce290" table:formula="of:=((([.Q26]+1)*1.618)-(([.R26]+1)*1.618))/[.N26]" office:value-type="float" office:value="-7.7664" calcext:value-type="float">
            <text:p>-7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table:formula="of:=SUM([.B27:.M27])/12" office:value-type="float" office:value="0.666666666666667" calcext:value-type="float">
            <text:p>0,67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666666666666667" calcext:value-type="float">
            <text:p>0,67</text:p>
          </table:table-cell>
          <table:table-cell table:style-name="ce290" table:formula="of:=((([.Q27]+1)*1.618)-(([.R27]+1)*1.618))/[.N27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8" calcext:value-type="float">
            <text:p>372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7" calcext:value-type="float">
            <text:p>37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37:.AE3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6" calcext:value-type="float">
            <text:p>372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5" calcext:value-type="float">
            <text:p>37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number-columns-repeated="2"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4" calcext:value-type="float">
            <text:p>37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3" calcext:value-type="float">
            <text:p>37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2" calcext:value-type="float">
            <text:p>37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42:.AE42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1" calcext:value-type="float">
            <text:p>37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3:.AE43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0" calcext:value-type="float">
            <text:p>37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4:.AE44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9" calcext:value-type="float">
            <text:p>371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8" calcext:value-type="float">
            <text:p>37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7" calcext:value-type="float">
            <text:p>371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50:.AE50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51:.AE51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4:.AE54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6:.AE56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7:.AE5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6:.AE66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8:.AE6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9:.AE69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0:.AE7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5:.AE7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7:.AE77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9:.AE79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0:.AE80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1:.AE8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2:.AE82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3:.AE8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4:.AE84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5:.AE8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6:.AE86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7:.AE87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8:.AE88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9:.AE8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0:.AE90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1:.AE9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2:.AE92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3:.AE93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4:.AE9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5:.AE95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6:.AE96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7:.AE9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8:.AE98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9:.AE9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00:.AE100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3:.AE103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4:.AE10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6:.AE10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7:.AE107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9:.AE10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11:.AE111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2:.AE112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16:.AE116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4:.AE12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5:.AE125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4:.AE134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6:.AE13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7:.AE13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1:.AE14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42:.AE14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5:.AE145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8:.AE14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9:.AE14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0:.AE15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51:.AE15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2:.AE152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3:.AE15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4:.AE154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5:.AE15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6:.AE156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57:.AE15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8:.AE15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9:.AE159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0:.AE16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1:.AE16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2:.AE162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3:.AE163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4:.AE16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5:.AE16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6:.AE166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7:.AE167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68:.AE168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9:.AE16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70:.AE17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71:.AE17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73:.AE173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74:.AE174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6:.AE176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77:.AE177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8:.AE178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9:.AE179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0:.AE180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1:.AE18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2:.AE18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83:.AE183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4:.AE184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5:.AE18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86:.AE186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7:.AE187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8:.AE188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9:.AE18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90:.AE190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91:.AE191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92:.AE192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93:.AE19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94:.AE19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5:.AE195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6:.AE196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7:.AE19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8:.AE19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9:.AE19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0:.AE20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1:.AE20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2:.AE20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3:.AE20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4:.AE20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5:.AE20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6:.AE206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69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40:'Analise-Facil'.AE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18:54:14.700287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61</meta:editing-cycles>
    <meta:creation-date>2025-05-07T18:30:17</meta:creation-date>
    <dc:date>2026-07-07T19:04:02.945466600</dc:date>
    <dc:language>pt-BR</dc:language>
    <meta:editing-duration>P6DT11H18M58S</meta:editing-duration>
    <meta:generator>LibreOffice/25.8.7.3$Windows_X86_64 LibreOffice_project/30742500f2d3eb4366ac312fa33d3dcabdb3eba5</meta:generator>
    <meta:print-date>2026-04-16T17:11:55.921000000</meta:print-date>
    <meta:document-statistic meta:table-count="7" meta:cell-count="6161" meta:object-count="0"/>
    <meta:user-defined meta:name="AppVersion">16.0300</meta:user-defined>
  </office:meta>
</office:document-meta>
</file>