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272" office:value-type="float" office:value="3723" calcext:value-type="float">
            <text:p>3723</text:p>
          </table:table-cell>
          <table:table-cell table:style-name="ce272" office:value-type="float" office:value="3724" calcext:value-type="float">
            <text:p>3724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3:.M3])/12" office:value-type="float" office:value="0.5" calcext:value-type="float">
            <text:p>0,50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5" calcext:value-type="float">
            <text:p>0,50</text:p>
          </table:table-cell>
          <table:table-cell table:style-name="ce290" table:formula="of:=((([.Q3]+1)*1.618)-(([.R3]+1)*1.618))/[.N3]" office:value-type="float" office:value="3.236" calcext:value-type="float">
            <text:p>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1" table:formula="of:=SUM([.B4:.M4])/12" office:value-type="float" office:value="0.583333333333333" calcext:value-type="float">
            <text:p>0,58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583333333333333" calcext:value-type="float">
            <text:p>0,58</text:p>
          </table:table-cell>
          <table:table-cell table:style-name="ce290" table:formula="of:=((([.Q4]+1)*1.618)-(([.R4]+1)*1.618))/[.N4]" office:value-type="float" office:value="8.32114285714286" calcext:value-type="float">
            <text:p>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3.236" calcext:value-type="float">
            <text:p>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6:.M6])/12" office:value-type="float" office:value="0.583333333333333" calcext:value-type="float">
            <text:p>0,58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6]" office:value-type="float" office:value="0.583333333333333" calcext:value-type="float">
            <text:p>0,58</text:p>
          </table:table-cell>
          <table:table-cell table:style-name="ce290" table:formula="of:=((([.Q6]+1)*1.618)-(([.R6]+1)*1.618))/[.N6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1" table:formula="of:=SUM([.B7:.M7])/12" office:value-type="float" office:value="0.916666666666667" calcext:value-type="float">
            <text:p>0,9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916666666666667" calcext:value-type="float">
            <text:p>0,92</text:p>
          </table:table-cell>
          <table:table-cell table:style-name="ce290" table:formula="of:=((([.Q7]+1)*1.618)-(([.R7]+1)*1.618))/[.N7]" office:value-type="float" office:value="8.82545454545455" calcext:value-type="float">
            <text:p>8,8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1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8.32114285714286" calcext:value-type="float">
            <text:p>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1" table:formula="of:=SUM([.B9:.M9])/12" office:value-type="float" office:value="0.666666666666667" calcext:value-type="float">
            <text:p>0,67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666666666666667" calcext:value-type="float">
            <text:p>0,67</text:p>
          </table:table-cell>
          <table:table-cell table:style-name="ce290" table:formula="of:=((([.Q9]+1)*1.618)-(([.R9]+1)*1.618))/[.N9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1" table:formula="of:=SUM([.B10:.M10])/12" office:value-type="float" office:value="0.333333333333333" calcext:value-type="float">
            <text:p>0,33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0]" office:value-type="float" office:value="0.333333333333333" calcext:value-type="float">
            <text:p>0,33</text:p>
          </table:table-cell>
          <table:table-cell table:style-name="ce290" table:formula="of:=((([.Q10]+1)*1.618)-(([.R10]+1)*1.618))/[.N10]" office:value-type="float" office:value="-14.562" calcext:value-type="float">
            <text:p>-14,5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1" table:formula="of:=SUM([.B11:.M11])/12" office:value-type="float" office:value="0.583333333333333" calcext:value-type="float">
            <text:p>0,58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1]" office:value-type="float" office:value="0.583333333333333" calcext:value-type="float">
            <text:p>0,58</text:p>
          </table:table-cell>
          <table:table-cell table:style-name="ce290" table:formula="of:=((([.Q11]+1)*1.618)-(([.R11]+1)*1.618))/[.N11]" office:value-type="float" office:value="-5.54742857142857" calcext:value-type="float">
            <text:p>-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9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1" table:formula="of:=SUM([.B13:.M13])/12" office:value-type="float" office:value="0.833333333333333" calcext:value-type="float">
            <text:p>0,83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3]" office:value-type="float" office:value="0.833333333333333" calcext:value-type="float">
            <text:p>0,83</text:p>
          </table:table-cell>
          <table:table-cell table:style-name="ce290" table:formula="of:=((([.Q13]+1)*1.618)-(([.R13]+1)*1.618))/[.N13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1" table:formula="of:=SUM([.B14:.M14])/12" office:value-type="float" office:value="0.833333333333333" calcext:value-type="float">
            <text:p>0,83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833333333333333" calcext:value-type="float">
            <text:p>0,83</text:p>
          </table:table-cell>
          <table:table-cell table:style-name="ce290" table:formula="of:=((([.Q14]+1)*1.618)-(([.R14]+1)*1.618))/[.N14]" office:value-type="float" office:value="7.7664" calcext:value-type="float">
            <text:p>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1" table:formula="of:=SUM([.B15:.M15])/12" office:value-type="float" office:value="0.333333333333333" calcext:value-type="float">
            <text:p>0,33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5]" office:value-type="float" office:value="0.333333333333333" calcext:value-type="float">
            <text:p>0,33</text:p>
          </table:table-cell>
          <table:table-cell table:style-name="ce290" table:formula="of:=((([.Q15]+1)*1.618)-(([.R15]+1)*1.618))/[.N15]" office:value-type="float" office:value="-9.708" calcext:value-type="float">
            <text:p>-9,71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1" table:formula="of:=SUM([.B16:.M16])/12" office:value-type="float" office:value="0.666666666666667" calcext:value-type="float">
            <text:p>0,67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6]" office:value-type="float" office:value="0.666666666666667" calcext:value-type="float">
            <text:p>0,67</text:p>
          </table:table-cell>
          <table:table-cell table:style-name="ce290" table:formula="of:=((([.Q16]+1)*1.618)-(([.R16]+1)*1.618))/[.N16]" office:value-type="float" office:value="-4.854" calcext:value-type="float">
            <text:p>-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1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11.6496" calcext:value-type="float">
            <text:p>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18:.M18])/12" office:value-type="float" office:value="0.416666666666667" calcext:value-type="float">
            <text:p>0,42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416666666666667" calcext:value-type="float">
            <text:p>0,42</text:p>
          </table:table-cell>
          <table:table-cell table:style-name="ce290" table:formula="of:=((([.Q18]+1)*1.618)-(([.R18]+1)*1.618))/[.N18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1" table:formula="of:=SUM([.B19:.M19])/12" office:value-type="float" office:value="0.583333333333333" calcext:value-type="float">
            <text:p>0,58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583333333333333" calcext:value-type="float">
            <text:p>0,58</text:p>
          </table:table-cell>
          <table:table-cell table:style-name="ce290" table:formula="of:=((([.Q19]+1)*1.618)-(([.R19]+1)*1.618))/[.N19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1" table:formula="of:=SUM([.B21:.M21])/12" office:value-type="float" office:value="0.583333333333333" calcext:value-type="float">
            <text:p>0,58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583333333333333" calcext:value-type="float">
            <text:p>0,58</text:p>
          </table:table-cell>
          <table:table-cell table:style-name="ce290" table:formula="of:=((([.Q21]+1)*1.618)-(([.R21]+1)*1.618))/[.N21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22:.M22])/12" office:value-type="float" office:value="0.666666666666667" calcext:value-type="float">
            <text:p>0,67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666666666666667" calcext:value-type="float">
            <text:p>0,67</text:p>
          </table:table-cell>
          <table:table-cell table:style-name="ce290" table:formula="of:=((([.Q22]+1)*1.618)-(([.R22]+1)*1.618))/[.N22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1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6:.M26])/12" office:value-type="float" office:value="0.416666666666667" calcext:value-type="float">
            <text:p>0,42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6]" office:value-type="float" office:value="0.416666666666667" calcext:value-type="float">
            <text:p>0,42</text:p>
          </table:table-cell>
          <table:table-cell table:style-name="ce290" table:formula="of:=((([.Q26]+1)*1.618)-(([.R26]+1)*1.618))/[.N26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1" table:formula="of:=SUM([.B27:.M27])/12" office:value-type="float" office:value="0.583333333333333" calcext:value-type="float">
            <text:p>0,58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583333333333333" calcext:value-type="float">
            <text:p>0,58</text:p>
          </table:table-cell>
          <table:table-cell table:style-name="ce290" table:formula="of:=((([.Q27]+1)*1.618)-(([.R27]+1)*1.618))/[.N27]" office:value-type="float" office:value="5.54742857142857" calcext:value-type="float">
            <text:p>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4" calcext:value-type="float">
            <text:p>37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3" calcext:value-type="float">
            <text:p>37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8:.AE3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9:.AE39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0:.AE40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6:.AE4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47:.AE47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2:.AE6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4:.AE6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5:.AE6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6:.AE6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1:.AE7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6:.AE76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5:.AE8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8:.AE88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9:.AE89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4:.AE94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5:.AE9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6:.AE9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9:.AE9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2:.AE10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3:.AE10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5:.AE10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07:.AE10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2:.AE112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0:.AE12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0:.AE13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3:.AE13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7:.AE13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8:.AE13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7:.AE14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3:.AE153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4:.AE1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6:.AE15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7:.AE15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8:.AE15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9:.AE159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0:.AE16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1:.AE16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2:.AE162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3:.AE16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4:.AE16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5:.AE16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6:.AE16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7:.AE1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9:.AE169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70:.AE170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2:.AE172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3:.AE17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9:.AE179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1:.AE18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2:.AE18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3:.AE18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4:.AE184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5:.AE18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6:.AE18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7:.AE18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8:.AE18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9:.AE189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0:.AE19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1:.AE191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2:.AE192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5:.AE19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3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0:23:42.31282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56</meta:editing-cycles>
    <meta:creation-date>2025-05-07T18:30:17</meta:creation-date>
    <dc:date>2026-07-02T10:32:04.174674300</dc:date>
    <dc:language>pt-BR</dc:language>
    <meta:editing-duration>P6DT10H44M48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093" meta:object-count="0"/>
    <meta:user-defined meta:name="AppVersion">16.0300</meta:user-defined>
  </office:meta>
</office:document-meta>
</file>