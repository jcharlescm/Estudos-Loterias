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3:.M3])/12" office:value-type="float" office:value="0.833333333333333" calcext:value-type="float">
            <text:p>0,83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3]" office:value-type="float" office:value="0.833333333333333" calcext:value-type="float">
            <text:p>0,83</text:p>
          </table:table-cell>
          <table:table-cell table:style-name="ce290" table:formula="of:=((([.Q3]+1)*1.618)-(([.R3]+1)*1.618))/[.N3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4:.M4])/12" office:value-type="float" office:value="0.333333333333333" calcext:value-type="float">
            <text:p>0,33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4]" office:value-type="float" office:value="0.333333333333333" calcext:value-type="float">
            <text:p>0,33</text:p>
          </table:table-cell>
          <table:table-cell table:style-name="ce290" table:formula="of:=((([.Q4]+1)*1.618)-(([.R4]+1)*1.618))/[.N4]" office:value-type="float" office:value="-4.854" calcext:value-type="float">
            <text:p>-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6:.M6])/12" office:value-type="float" office:value="0.75" calcext:value-type="float">
            <text:p>0,75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75" calcext:value-type="float">
            <text:p>0,75</text:p>
          </table:table-cell>
          <table:table-cell table:style-name="ce290" table:formula="of:=((([.Q6]+1)*1.618)-(([.R6]+1)*1.618))/[.N6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7:.M7])/12" office:value-type="float" office:value="0.5" calcext:value-type="float">
            <text:p>0,50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5" calcext:value-type="float">
            <text:p>0,50</text:p>
          </table:table-cell>
          <table:table-cell table:style-name="ce290" table:formula="of:=((([.Q7]+1)*1.618)-(([.R7]+1)*1.618))/[.N7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8:.M8])/12" office:value-type="float" office:value="0.75" calcext:value-type="float">
            <text:p>0,75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7" calcext:value-type="float">
            <text:p>7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75" calcext:value-type="float">
            <text:p>0,75</text:p>
          </table:table-cell>
          <table:table-cell table:style-name="ce290" table:formula="of:=((([.Q8]+1)*1.618)-(([.R8]+1)*1.618))/[.N8]" office:value-type="float" office:value="15.1013333333333" calcext:value-type="float">
            <text:p>15,1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4.854" calcext:value-type="float">
            <text:p>-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3:.M13])/12" office:value-type="float" office:value="0.333333333333333" calcext:value-type="float">
            <text:p>0,33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333333333333333" calcext:value-type="float">
            <text:p>0,33</text:p>
          </table:table-cell>
          <table:table-cell table:style-name="ce290" table:formula="of:=((([.Q13]+1)*1.618)-(([.R13]+1)*1.618))/[.N13]" office:value-type="float" office:value="9.708" calcext:value-type="float">
            <text:p>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4:.M14])/12" office:value-type="float" office:value="0.5" calcext:value-type="float">
            <text:p>0,50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5" calcext:value-type="float">
            <text:p>0,50</text:p>
          </table:table-cell>
          <table:table-cell table:style-name="ce290" table:formula="of:=((([.Q14]+1)*1.618)-(([.R14]+1)*1.618))/[.N14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13.8685714285714" calcext:value-type="float">
            <text:p>13,87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5.8248" calcext:value-type="float">
            <text:p>5,8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17:.M17])/12" office:value-type="float" office:value="0.833333333333333" calcext:value-type="float">
            <text:p>0,83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833333333333333" calcext:value-type="float">
            <text:p>0,83</text:p>
          </table:table-cell>
          <table:table-cell table:style-name="ce290" table:formula="of:=((([.Q17]+1)*1.618)-(([.R17]+1)*1.618))/[.N17]" office:value-type="float" office:value="11.6496" calcext:value-type="float">
            <text:p>11,6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333333333333333" calcext:value-type="float">
            <text:p>0,33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9]" office:value-type="float" office:value="0.333333333333333" calcext:value-type="float">
            <text:p>0,33</text:p>
          </table:table-cell>
          <table:table-cell table:style-name="ce290" table:formula="of:=((([.Q19]+1)*1.618)-(([.R19]+1)*1.618))/[.N19]" office:value-type="float" office:value="-14.562" calcext:value-type="float">
            <text:p>-14,5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1:.M21])/12" office:value-type="float" office:value="0.5" calcext:value-type="float">
            <text:p>0,50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5" calcext:value-type="float">
            <text:p>0,50</text:p>
          </table:table-cell>
          <table:table-cell table:style-name="ce290" table:formula="of:=((([.Q21]+1)*1.618)-(([.R21]+1)*1.618))/[.N21]" office:value-type="float" office:value="9.708" calcext:value-type="float">
            <text:p>9,7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583333333333333" calcext:value-type="float">
            <text:p>0,58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26]" office:value-type="float" office:value="0.583333333333333" calcext:value-type="float">
            <text:p>0,58</text:p>
          </table:table-cell>
          <table:table-cell table:style-name="ce290" table:formula="of:=((([.Q26]+1)*1.618)-(([.R26]+1)*1.618))/[.N26]" office:value-type="float" office:value="-8.32114285714286" calcext:value-type="float">
            <text:p>-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-4.854" calcext:value-type="float">
            <text:p>-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4" calcext:value-type="float">
            <text:p>14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36:.AE3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7:.AE37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2:.AE4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3:.AE4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2:.AE5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4:.AE5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5:.AE5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6:.AE5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1:.AE6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6:.AE66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8:.AE6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1:.AE7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5:.AE7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9:.AE79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1:.AE81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2:.AE82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4:.AE84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6:.AE8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8:.AE8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3:.AE9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4:.AE9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7:.AE9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8:.AE98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2:.AE102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0:.AE11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0:.AE12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3:.AE12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7:.AE12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8:.AE12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2:.AE132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4:.AE13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7:.AE13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3:.AE143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4:.AE14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7:.AE147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1:.AE15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2:.AE152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3:.AE153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4:.AE15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5:.AE15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6:.AE15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7:.AE15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8:.AE15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9:.AE159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0:.AE160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1:.AE16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2:.AE162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3:.AE16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9:.AE169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2:.AE17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6:.AE17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7:.AE17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8:.AE17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9:.AE179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0:.AE18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1:.AE181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2:.AE182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3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20:31:51.32592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40</meta:editing-cycles>
    <meta:creation-date>2025-05-07T18:30:17</meta:creation-date>
    <dc:date>2026-06-18T22:02:15.324753800</dc:date>
    <dc:language>pt-BR</dc:language>
    <meta:editing-duration>P6DT2H29M59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923" meta:object-count="0"/>
    <meta:user-defined meta:name="AppVersion">16.0300</meta:user-defined>
  </office:meta>
</office:document-meta>
</file>