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1" calcext:value-type="float">
            <text:p>3701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3:.M3])/12" office:value-type="float" office:value="0.916666666666667" calcext:value-type="float">
            <text:p>0,92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916666666666667" calcext:value-type="float">
            <text:p>0,92</text:p>
          </table:table-cell>
          <table:table-cell table:style-name="ce290" table:formula="of:=((([.Q3]+1)*1.618)-(([.R3]+1)*1.618))/[.N3]" office:value-type="float" office:value="15.8858181818182" calcext:value-type="float">
            <text:p>15,8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7:.M7])/12" office:value-type="float" office:value="0.416666666666667" calcext:value-type="float">
            <text:p>0,4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416666666666667" calcext:value-type="float">
            <text:p>0,42</text:p>
          </table:table-cell>
          <table:table-cell table:style-name="ce290" table:formula="of:=((([.Q7]+1)*1.618)-(([.R7]+1)*1.618))/[.N7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13.8685714285714" calcext:value-type="float">
            <text:p>13,8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14.562" calcext:value-type="float">
            <text:p>-14,5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3:.M13])/12" office:value-type="float" office:value="0.166666666666667" calcext:value-type="float">
            <text:p>0,17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3]" office:value-type="float" office:value="0.166666666666667" calcext:value-type="float">
            <text:p>0,17</text:p>
          </table:table-cell>
          <table:table-cell table:style-name="ce290" table:formula="of:=((([.Q13]+1)*1.618)-(([.R13]+1)*1.618))/[.N13]" office:value-type="float" office:value="-29.124" calcext:value-type="float">
            <text:p>-29,1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8.32114285714286" calcext:value-type="float">
            <text:p>8,32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1.9416" calcext:value-type="float">
            <text:p>1,9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1:.M21])/12" office:value-type="float" office:value="0.333333333333333" calcext:value-type="float">
            <text:p>0,33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333333333333333" calcext:value-type="float">
            <text:p>0,33</text:p>
          </table:table-cell>
          <table:table-cell table:style-name="ce290" table:formula="of:=((([.Q21]+1)*1.618)-(([.R21]+1)*1.618))/[.N21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5:.M25])/12" office:value-type="float" office:value="0.666666666666667" calcext:value-type="float">
            <text:p>0,67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666666666666667" calcext:value-type="float">
            <text:p>0,67</text:p>
          </table:table-cell>
          <table:table-cell table:style-name="ce290" table:formula="of:=((([.Q25]+1)*1.618)-(([.R25]+1)*1.618))/[.N25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27:.M27])/12" office:value-type="float" office:value="0.833333333333333" calcext:value-type="float">
            <text:p>0,83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833333333333333" calcext:value-type="float">
            <text:p>0,83</text:p>
          </table:table-cell>
          <table:table-cell table:style-name="ce290" table:formula="of:=((([.Q27]+1)*1.618)-(([.R27]+1)*1.618))/[.N27]" office:value-type="float" office:value="7.7664" calcext:value-type="float">
            <text:p>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4" calcext:value-type="float">
            <text:p>14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0:.AE4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1:.AE4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0:.AE5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9:.AE5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4:.AE64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6:.AE6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1:.AE7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7:.AE77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2:.AE82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4:.AE8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4:.AE9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5:.AE9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0:.AE10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8:.AE11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1:.AE12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5:.AE12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0:.AE13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2:.AE13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5:.AE13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1:.AE14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2:.AE15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3:.AE15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4:.AE15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5:.AE15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6:.AE15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7:.AE15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8:.AE15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9:.AE15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0:.AE16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1:.AE1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2:.AE162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7:.AE16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0:.AE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4:.AE17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7:.AE17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8:.AE17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79:.AE179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0:.AE18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5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6:13:23.25881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3</meta:editing-cycles>
    <meta:creation-date>2025-05-07T18:30:17</meta:creation-date>
    <dc:date>2026-06-17T11:15:35.865281600</dc:date>
    <dc:language>pt-BR</dc:language>
    <meta:editing-duration>P6DT11M18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89" meta:object-count="0"/>
    <meta:user-defined meta:name="AppVersion">16.0300</meta:user-defined>
  </office:meta>
</office:document-meta>
</file>