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11" calcext:value-type="float">
            <text:p>3711</text:p>
          </table:table-cell>
          <table:table-cell table:style-name="ce272" office:value-type="float" office:value="3712" calcext:value-type="float">
            <text:p>3712</text:p>
          </table:table-cell>
          <table:table-cell table:style-name="ce272" office:value-type="float" office:value="3713" calcext:value-type="float">
            <text:p>3713</text:p>
          </table:table-cell>
          <table:table-cell table:style-name="ce272" office:value-type="float" office:value="3714" calcext:value-type="float">
            <text:p>3714</text:p>
          </table:table-cell>
          <table:table-cell table:style-name="ce272" office:value-type="float" office:value="3715" calcext:value-type="float">
            <text:p>3715</text:p>
          </table:table-cell>
          <table:table-cell table:style-name="ce272" office:value-type="float" office:value="3716" calcext:value-type="float">
            <text:p>3716</text:p>
          </table:table-cell>
          <table:table-cell table:style-name="ce272" office:value-type="float" office:value="3717" calcext:value-type="float">
            <text:p>3717</text:p>
          </table:table-cell>
          <table:table-cell table:style-name="ce272" office:value-type="float" office:value="3718" calcext:value-type="float">
            <text:p>3718</text:p>
          </table:table-cell>
          <table:table-cell table:style-name="ce272" office:value-type="float" office:value="3719" calcext:value-type="float">
            <text:p>3719</text:p>
          </table:table-cell>
          <table:table-cell table:style-name="ce272" office:value-type="float" office:value="3720" calcext:value-type="float">
            <text:p>3720</text:p>
          </table:table-cell>
          <table:table-cell table:style-name="ce272" office:value-type="float" office:value="3721" calcext:value-type="float">
            <text:p>3721</text:p>
          </table:table-cell>
          <table:table-cell table:style-name="ce272" office:value-type="float" office:value="3722" calcext:value-type="float">
            <text:p>3722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3:.M3])/12" office:value-type="float" office:value="0.583333333333333" calcext:value-type="float">
            <text:p>0,58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3]" office:value-type="float" office:value="0.583333333333333" calcext:value-type="float">
            <text:p>0,58</text:p>
          </table:table-cell>
          <table:table-cell table:style-name="ce290" table:formula="of:=((([.Q3]+1)*1.618)-(([.R3]+1)*1.618))/[.N3]" office:value-type="float" office:value="-2.77371428571429" calcext:value-type="float">
            <text:p>-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4:.M4])/12" office:value-type="float" office:value="0.416666666666667" calcext:value-type="float">
            <text:p>0,42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4]" office:value-type="float" office:value="0.416666666666667" calcext:value-type="float">
            <text:p>0,42</text:p>
          </table:table-cell>
          <table:table-cell table:style-name="ce290" table:formula="of:=((([.Q4]+1)*1.618)-(([.R4]+1)*1.618))/[.N4]" office:value-type="float" office:value="3.8832" calcext:value-type="float">
            <text:p>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5:.M5])/12" office:value-type="float" office:value="0.5" calcext:value-type="float">
            <text:p>0,50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5]" office:value-type="float" office:value="0.5" calcext:value-type="float">
            <text:p>0,50</text:p>
          </table:table-cell>
          <table:table-cell table:style-name="ce290" table:formula="of:=((([.Q5]+1)*1.618)-(([.R5]+1)*1.618))/[.N5]" office:value-type="float" office:value="6.472" calcext:value-type="float">
            <text:p>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6:.M6])/12" office:value-type="float" office:value="0.583333333333333" calcext:value-type="float">
            <text:p>0,58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6]" office:value-type="float" office:value="0.583333333333333" calcext:value-type="float">
            <text:p>0,58</text:p>
          </table:table-cell>
          <table:table-cell table:style-name="ce290" table:formula="of:=((([.Q6]+1)*1.618)-(([.R6]+1)*1.618))/[.N6]" office:value-type="float" office:value="-2.77371428571429" calcext:value-type="float">
            <text:p>-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7:.M7])/12" office:value-type="float" office:value="0.833333333333333" calcext:value-type="float">
            <text:p>0,83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7]" office:value-type="float" office:value="0.833333333333333" calcext:value-type="float">
            <text:p>0,83</text:p>
          </table:table-cell>
          <table:table-cell table:style-name="ce290" table:formula="of:=((([.Q7]+1)*1.618)-(([.R7]+1)*1.618))/[.N7]" office:value-type="float" office:value="5.8248" calcext:value-type="float">
            <text:p>5,8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8:.M8])/12" office:value-type="float" office:value="0.583333333333333" calcext:value-type="float">
            <text:p>0,58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8]" office:value-type="float" office:value="0.583333333333333" calcext:value-type="float">
            <text:p>0,58</text:p>
          </table:table-cell>
          <table:table-cell table:style-name="ce290" table:formula="of:=((([.Q8]+1)*1.618)-(([.R8]+1)*1.618))/[.N8]" office:value-type="float" office:value="2.77371428571429" calcext:value-type="float">
            <text:p>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9:.M9])/12" office:value-type="float" office:value="0.5" calcext:value-type="float">
            <text:p>0,50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9]" office:value-type="float" office:value="0.5" calcext:value-type="float">
            <text:p>0,50</text:p>
          </table:table-cell>
          <table:table-cell table:style-name="ce290" table:formula="of:=((([.Q9]+1)*1.618)-(([.R9]+1)*1.618))/[.N9]" office:value-type="float" office:value="-3.236" calcext:value-type="float">
            <text:p>-3,2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0:.M10])/12" office:value-type="float" office:value="0.416666666666667" calcext:value-type="float">
            <text:p>0,42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0]" office:value-type="float" office:value="0.416666666666667" calcext:value-type="float">
            <text:p>0,42</text:p>
          </table:table-cell>
          <table:table-cell table:style-name="ce290" table:formula="of:=((([.Q10]+1)*1.618)-(([.R10]+1)*1.618))/[.N10]" office:value-type="float" office:value="-3.8832" calcext:value-type="float">
            <text:p>-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1:.M11])/12" office:value-type="float" office:value="0.666666666666667" calcext:value-type="float">
            <text:p>0,67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1]" office:value-type="float" office:value="0.666666666666667" calcext:value-type="float">
            <text:p>0,67</text:p>
          </table:table-cell>
          <table:table-cell table:style-name="ce290" table:formula="of:=((([.Q11]+1)*1.618)-(([.R11]+1)*1.618))/[.N11]" office:value-type="float" office:value="2.427" calcext:value-type="float">
            <text:p>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62" table:formula="of:=SUM([.B12:.M12])/12" office:value-type="float" office:value="0.583333333333333" calcext:value-type="float">
            <text:p>0,58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2]" office:value-type="float" office:value="0.583333333333333" calcext:value-type="float">
            <text:p>0,58</text:p>
          </table:table-cell>
          <table:table-cell table:style-name="ce290" table:formula="of:=((([.Q12]+1)*1.618)-(([.R12]+1)*1.618))/[.N12]" office:value-type="float" office:value="11.0948571428571" calcext:value-type="float">
            <text:p>11,09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9" table:style-name="ce273" office:value-type="float" office:value="1" calcext:value-type="float">
            <text:p>1</text:p>
          </table:table-cell>
          <table:table-cell table:style-name="ce62" table:formula="of:=SUM([.B13:.M13])/12" office:value-type="float" office:value="0.833333333333333" calcext:value-type="float">
            <text:p>0,83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10" calcext:value-type="float">
            <text:p>1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3]" office:value-type="float" office:value="0.833333333333333" calcext:value-type="float">
            <text:p>0,83</text:p>
          </table:table-cell>
          <table:table-cell table:style-name="ce290" table:formula="of:=((([.Q13]+1)*1.618)-(([.R13]+1)*1.618))/[.N13]" office:value-type="float" office:value="19.416" calcext:value-type="float">
            <text:p>19,4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4:.M14])/12" office:value-type="float" office:value="0.75" calcext:value-type="float">
            <text:p>0,75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4]" office:value-type="float" office:value="0.75" calcext:value-type="float">
            <text:p>0,75</text:p>
          </table:table-cell>
          <table:table-cell table:style-name="ce290" table:formula="of:=((([.Q14]+1)*1.618)-(([.R14]+1)*1.618))/[.N14]" office:value-type="float" office:value="4.31466666666667" calcext:value-type="float">
            <text:p>4,3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5:.M15])/12" office:value-type="float" office:value="0.5" calcext:value-type="float">
            <text:p>0,50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5]" office:value-type="float" office:value="0.5" calcext:value-type="float">
            <text:p>0,50</text:p>
          </table:table-cell>
          <table:table-cell table:style-name="ce290" table:formula="of:=((([.Q15]+1)*1.618)-(([.R15]+1)*1.618))/[.N15]" office:value-type="float" office:value="3.236" calcext:value-type="float">
            <text:p>3,24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6:.M16])/12" office:value-type="float" office:value="0.75" calcext:value-type="float">
            <text:p>0,75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6]" office:value-type="float" office:value="0.75" calcext:value-type="float">
            <text:p>0,75</text:p>
          </table:table-cell>
          <table:table-cell table:style-name="ce290" table:formula="of:=((([.Q16]+1)*1.618)-(([.R16]+1)*1.618))/[.N16]" office:value-type="float" office:value="4.31466666666667" calcext:value-type="float">
            <text:p>4,3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62" table:formula="of:=SUM([.B17:.M17])/12" office:value-type="float" office:value="0.833333333333333" calcext:value-type="float">
            <text:p>0,83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7]" office:value-type="float" office:value="0.833333333333333" calcext:value-type="float">
            <text:p>0,83</text:p>
          </table:table-cell>
          <table:table-cell table:style-name="ce290" table:formula="of:=((([.Q17]+1)*1.618)-(([.R17]+1)*1.618))/[.N17]" office:value-type="float" office:value="7.7664" calcext:value-type="float">
            <text:p>7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18:.M18])/12" office:value-type="float" office:value="0.5" calcext:value-type="float">
            <text:p>0,50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8]" office:value-type="float" office:value="0.5" calcext:value-type="float">
            <text:p>0,50</text:p>
          </table:table-cell>
          <table:table-cell table:style-name="ce290" table:formula="of:=((([.Q18]+1)*1.618)-(([.R18]+1)*1.618))/[.N18]" office:value-type="float" office:value="-6.472" calcext:value-type="float">
            <text:p>-6,4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9:.M19])/12" office:value-type="float" office:value="0.5" calcext:value-type="float">
            <text:p>0,50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9]" office:value-type="float" office:value="0.5" calcext:value-type="float">
            <text:p>0,50</text:p>
          </table:table-cell>
          <table:table-cell table:style-name="ce290" table:formula="of:=((([.Q19]+1)*1.618)-(([.R19]+1)*1.618))/[.N19]" office:value-type="float" office:value="3.236" calcext:value-type="float">
            <text:p>3,2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20:.M20])/12" office:value-type="float" office:value="0.666666666666667" calcext:value-type="float">
            <text:p>0,67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20]" office:value-type="float" office:value="0.666666666666667" calcext:value-type="float">
            <text:p>0,67</text:p>
          </table:table-cell>
          <table:table-cell table:style-name="ce290" table:formula="of:=((([.Q20]+1)*1.618)-(([.R20]+1)*1.618))/[.N20]" office:value-type="float" office:value="-4.854" calcext:value-type="float">
            <text:p>-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1:.M21])/12" office:value-type="float" office:value="0.5" calcext:value-type="float">
            <text:p>0,50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1]" office:value-type="float" office:value="0.5" calcext:value-type="float">
            <text:p>0,50</text:p>
          </table:table-cell>
          <table:table-cell table:style-name="ce290" table:formula="of:=((([.Q21]+1)*1.618)-(([.R21]+1)*1.618))/[.N21]" office:value-type="float" office:value="3.236" calcext:value-type="float">
            <text:p>3,2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22:.M22])/12" office:value-type="float" office:value="0.75" calcext:value-type="float">
            <text:p>0,75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2]" office:value-type="float" office:value="0.75" calcext:value-type="float">
            <text:p>0,75</text:p>
          </table:table-cell>
          <table:table-cell table:style-name="ce290" table:formula="of:=((([.Q22]+1)*1.618)-(([.R22]+1)*1.618))/[.N22]" office:value-type="float" office:value="6.472" calcext:value-type="float">
            <text:p>6,4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3:.M23])/12" office:value-type="float" office:value="0.583333333333333" calcext:value-type="float">
            <text:p>0,58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3]" office:value-type="float" office:value="0.583333333333333" calcext:value-type="float">
            <text:p>0,58</text:p>
          </table:table-cell>
          <table:table-cell table:style-name="ce290" table:formula="of:=((([.Q23]+1)*1.618)-(([.R23]+1)*1.618))/[.N23]" office:value-type="float" office:value="-2.77371428571429" calcext:value-type="float">
            <text:p>-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24:.M24])/12" office:value-type="float" office:value="0.666666666666667" calcext:value-type="float">
            <text:p>0,67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24]" office:value-type="float" office:value="0.666666666666667" calcext:value-type="float">
            <text:p>0,67</text:p>
          </table:table-cell>
          <table:table-cell table:style-name="ce290" table:formula="of:=((([.Q24]+1)*1.618)-(([.R24]+1)*1.618))/[.N24]" office:value-type="float" office:value="-4.854" calcext:value-type="float">
            <text:p>-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5:.M25])/12" office:value-type="float" office:value="0.5" calcext:value-type="float">
            <text:p>0,50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5]" office:value-type="float" office:value="0.5" calcext:value-type="float">
            <text:p>0,50</text:p>
          </table:table-cell>
          <table:table-cell table:style-name="ce290" table:formula="of:=((([.Q25]+1)*1.618)-(([.R25]+1)*1.618))/[.N25]" office:value-type="float" office:value="6.472" calcext:value-type="float">
            <text:p>6,4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6:.M26])/12" office:value-type="float" office:value="0.416666666666667" calcext:value-type="float">
            <text:p>0,42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6]" office:value-type="float" office:value="0.416666666666667" calcext:value-type="float">
            <text:p>0,42</text:p>
          </table:table-cell>
          <table:table-cell table:style-name="ce290" table:formula="of:=((([.Q26]+1)*1.618)-(([.R26]+1)*1.618))/[.N26]" office:value-type="float" office:value="-3.8832" calcext:value-type="float">
            <text:p>-3,88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2" table:formula="of:=SUM([.B27:.M27])/12" office:value-type="float" office:value="0.583333333333333" calcext:value-type="float">
            <text:p>0,58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27]" office:value-type="float" office:value="0.583333333333333" calcext:value-type="float">
            <text:p>0,58</text:p>
          </table:table-cell>
          <table:table-cell table:style-name="ce290" table:formula="of:=((([.Q27]+1)*1.618)-(([.R27]+1)*1.618))/[.N27]" office:value-type="float" office:value="-8.32114285714286" calcext:value-type="float">
            <text:p>-8,3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2" calcext:value-type="float">
            <text:p>37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36:.AE36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1" calcext:value-type="float">
            <text:p>37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37:.AE37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0" calcext:value-type="float">
            <text:p>37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38:.AE38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9" calcext:value-type="float">
            <text:p>371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9:.AE3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8" calcext:value-type="float">
            <text:p>37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0:.AE40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7" calcext:value-type="float">
            <text:p>371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1:.AE41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6" calcext:value-type="float">
            <text:p>37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2:.AE42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5" calcext:value-type="float">
            <text:p>3715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3:.AE43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4" calcext:value-type="float">
            <text:p>371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44:.AE44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3" calcext:value-type="float">
            <text:p>371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45:.AE45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6:.AE46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7:.AE4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0:.AE50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1:.AE51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2:.AE5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3:.AE53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4:.AE54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5:.AE55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6:.AE56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7:.AE57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8:.AE58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9:.AE5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0:.AE60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1:.AE61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2:.AE62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3:.AE63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4:.AE64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5:.AE65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6:.AE66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7:.AE67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8:.AE6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9:.AE6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0:.AE70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1:.AE71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2:.AE72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3:.AE73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74:.AE74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5:.AE75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6:.AE76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7:.AE7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8:.AE78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9:.AE7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0:.AE80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1:.AE81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2:.AE82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3:.AE83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4:.AE84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5:.AE8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6:.AE86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87:.AE87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8:.AE8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9:.AE89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0:.AE90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1:.AE91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92:.AE92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3:.AE93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94:.AE94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5:.AE9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6:.AE96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7:.AE97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8:.AE9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9:.AE99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0:.AE100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1:.AE101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2:.AE102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3:.AE10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4:.AE104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05:.AE105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6:.AE106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7:.AE107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8:.AE108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9:.AE109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10:.AE110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1:.AE111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2:.AE112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8:.AE11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9:.AE119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0:.AE12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1:.AE12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2:.AE12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4:.AE12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5:.AE125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6:.AE126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7:.AE127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8:.AE128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9:.AE129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0:.AE130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31:.AE131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2:.AE13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3:.AE13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4:.AE13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5:.AE13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36:.AE136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7:.AE137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8:.AE138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9:.AE139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0:.AE140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1:.AE141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2:.AE14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3:.AE14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4:.AE14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5:.AE145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6:.AE146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7:.AE147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8:.AE14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9:.AE14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0:.AE150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51:.AE151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2:.AE15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3:.AE153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4:.AE15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5:.AE15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6:.AE156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7:.AE157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8:.AE158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9:.AE15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0:.AE160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61:.AE161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62:.AE162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63:.AE163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64:.AE164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65:.AE165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6:.AE16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67:.AE167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68:.AE168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9:.AE169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0:.AE170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71:.AE171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2:.AE172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3:.AE173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4:.AE174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5:.AE175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6:.AE17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7:.AE177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8:.AE178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9:.AE17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80:.AE18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1:.AE181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2:.AE182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3:.AE18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4:.AE184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5:.AE185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6:.AE186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7:.AE187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8:.AE18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9:.AE189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90:.AE190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1:.AE19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2:.AE19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3:.AE19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4:.AE19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5:.AE19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6:.AE19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7:.AE19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8:.AE19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9:.AE19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0:.AE200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75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  <table:database-ranges>
        <table:database-range table:name="__Anonymous_Sheet_DB__4" table:target-range-address="'Analise-Facil'.Q36:'Analise-Facil'.AE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16:44:38.918748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53</meta:editing-cycles>
    <meta:creation-date>2025-05-07T18:30:17</meta:creation-date>
    <dc:date>2026-06-30T17:05:15.007601800</dc:date>
    <dc:language>pt-BR</dc:language>
    <meta:editing-duration>P6DT10H28M22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6059" meta:object-count="0"/>
    <meta:user-defined meta:name="AppVersion">16.0300</meta:user-defined>
  </office:meta>
</office:document-meta>
</file>