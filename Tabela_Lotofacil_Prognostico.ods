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number-columns-repeated="2" table:style-name="ce272" office:value-type="float" office:value="3715" calcext:value-type="float">
            <text:p>3715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3:.M3])/12" office:value-type="float" office:value="0.75" calcext:value-type="float">
            <text:p>0,75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3]" office:value-type="float" office:value="0.75" calcext:value-type="float">
            <text:p>0,75</text:p>
          </table:table-cell>
          <table:table-cell table:style-name="ce290" table:formula="of:=((([.Q3]+1)*1.618)-(([.R3]+1)*1.618))/[.N3]" office:value-type="float" office:value="-6.472" calcext:value-type="float">
            <text:p>-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-7.7664" calcext:value-type="float">
            <text:p>-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5:.M5])/12" office:value-type="float" office:value="0.5" calcext:value-type="float">
            <text:p>0,50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" calcext:value-type="float">
            <text:p>0,50</text:p>
          </table:table-cell>
          <table:table-cell table:style-name="ce290" table:formula="of:=((([.Q5]+1)*1.618)-(([.R5]+1)*1.618))/[.N5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75" calcext:value-type="float">
            <text:p>0,75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6]" office:value-type="float" office:value="0.75" calcext:value-type="float">
            <text:p>0,75</text:p>
          </table:table-cell>
          <table:table-cell table:style-name="ce290" table:formula="of:=((([.Q6]+1)*1.618)-(([.R6]+1)*1.618))/[.N6]" office:value-type="float" office:value="-2.15733333333333" calcext:value-type="float">
            <text:p>-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7:.M7])/12" office:value-type="float" office:value="0.583333333333333" calcext:value-type="float">
            <text:p>0,58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583333333333333" calcext:value-type="float">
            <text:p>0,58</text:p>
          </table:table-cell>
          <table:table-cell table:style-name="ce290" table:formula="of:=((([.Q7]+1)*1.618)-(([.R7]+1)*1.618))/[.N7]" office:value-type="float" office:value="8.32114285714286" calcext:value-type="float">
            <text:p>8,3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8:.M8])/12" office:value-type="float" office:value="0.833333333333333" calcext:value-type="float">
            <text:p>0,83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9" calcext:value-type="float">
            <text:p>9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833333333333333" calcext:value-type="float">
            <text:p>0,83</text:p>
          </table:table-cell>
          <table:table-cell table:style-name="ce290" table:formula="of:=((([.Q8]+1)*1.618)-(([.R8]+1)*1.618))/[.N8]" office:value-type="float" office:value="17.4744" calcext:value-type="float">
            <text:p>17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-9.708" calcext:value-type="float">
            <text:p>-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5" calcext:value-type="float">
            <text:p>0,50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0]" office:value-type="float" office:value="0.5" calcext:value-type="float">
            <text:p>0,50</text:p>
          </table:table-cell>
          <table:table-cell table:style-name="ce290" table:formula="of:=((([.Q10]+1)*1.618)-(([.R10]+1)*1.618))/[.N10]" office:value-type="float" office:value="-6.472" calcext:value-type="float">
            <text:p>-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75" calcext:value-type="float">
            <text:p>0,75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1]" office:value-type="float" office:value="0.75" calcext:value-type="float">
            <text:p>0,75</text:p>
          </table:table-cell>
          <table:table-cell table:style-name="ce290" table:formula="of:=((([.Q11]+1)*1.618)-(([.R11]+1)*1.618))/[.N11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5" calcext:value-type="float">
            <text:p>0,50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5" calcext:value-type="float">
            <text:p>0,50</text:p>
          </table:table-cell>
          <table:table-cell table:style-name="ce290" table:formula="of:=((([.Q12]+1)*1.618)-(([.R12]+1)*1.618))/[.N12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3:.M13])/12" office:value-type="float" office:value="0.416666666666667" calcext:value-type="float">
            <text:p>0,42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416666666666667" calcext:value-type="float">
            <text:p>0,42</text:p>
          </table:table-cell>
          <table:table-cell table:style-name="ce290" table:formula="of:=((([.Q13]+1)*1.618)-(([.R13]+1)*1.618))/[.N13]" office:value-type="float" office:value="11.6496" calcext:value-type="float">
            <text:p>11,6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4:.M14])/12" office:value-type="float" office:value="0.583333333333333" calcext:value-type="float">
            <text:p>0,58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583333333333333" calcext:value-type="float">
            <text:p>0,58</text:p>
          </table:table-cell>
          <table:table-cell table:style-name="ce290" table:formula="of:=((([.Q14]+1)*1.618)-(([.R14]+1)*1.618))/[.N14]" office:value-type="float" office:value="8.32114285714286" calcext:value-type="float">
            <text:p>8,3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5:.M15])/12" office:value-type="float" office:value="0.5" calcext:value-type="float">
            <text:p>0,50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5]" office:value-type="float" office:value="0.5" calcext:value-type="float">
            <text:p>0,50</text:p>
          </table:table-cell>
          <table:table-cell table:style-name="ce290" table:formula="of:=((([.Q15]+1)*1.618)-(([.R15]+1)*1.618))/[.N15]" office:value-type="float" office:value="-3.236" calcext:value-type="float">
            <text:p>-3,24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6:.M16])/12" office:value-type="float" office:value="0.75" calcext:value-type="float">
            <text:p>0,75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75" calcext:value-type="float">
            <text:p>0,75</text:p>
          </table:table-cell>
          <table:table-cell table:style-name="ce290" table:formula="of:=((([.Q16]+1)*1.618)-(([.R16]+1)*1.618))/[.N16]" office:value-type="float" office:value="8.62933333333333" calcext:value-type="float">
            <text:p>8,6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-2.15733333333333" calcext:value-type="float">
            <text:p>-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666666666666667" calcext:value-type="float">
            <text:p>0,67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666666666666667" calcext:value-type="float">
            <text:p>0,67</text:p>
          </table:table-cell>
          <table:table-cell table:style-name="ce290" table:formula="of:=((([.Q18]+1)*1.618)-(([.R18]+1)*1.618))/[.N18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9:.M19])/12" office:value-type="float" office:value="0.333333333333333" calcext:value-type="float">
            <text:p>0,33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4" calcext:value-type="float">
            <text:p>4,00</text:p>
          </table:table-cell>
          <table:table-cell table:style-name="ce287" table:formula="of:=[.N19]" office:value-type="float" office:value="0.333333333333333" calcext:value-type="float">
            <text:p>0,33</text:p>
          </table:table-cell>
          <table:table-cell table:style-name="ce290" table:formula="of:=((([.Q19]+1)*1.618)-(([.R19]+1)*1.618))/[.N19]" office:value-type="float" office:value="-19.416" calcext:value-type="float">
            <text:p>-19,4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0:.M20])/12" office:value-type="float" office:value="0.833333333333333" calcext:value-type="float">
            <text:p>0,83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833333333333333" calcext:value-type="float">
            <text:p>0,83</text:p>
          </table:table-cell>
          <table:table-cell table:style-name="ce290" table:formula="of:=((([.Q20]+1)*1.618)-(([.R20]+1)*1.618))/[.N20]" office:value-type="float" office:value="3.8832" calcext:value-type="float">
            <text:p>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1:.M21])/12" office:value-type="float" office:value="0.416666666666667" calcext:value-type="float">
            <text:p>0,42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1]" office:value-type="float" office:value="0.416666666666667" calcext:value-type="float">
            <text:p>0,42</text:p>
          </table:table-cell>
          <table:table-cell table:style-name="ce290" table:formula="of:=((([.Q21]+1)*1.618)-(([.R21]+1)*1.618))/[.N21]" office:value-type="float" office:value="-3.8832" calcext:value-type="float">
            <text:p>-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3:.M23])/12" office:value-type="float" office:value="0.666666666666667" calcext:value-type="float">
            <text:p>0,67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666666666666667" calcext:value-type="float">
            <text:p>0,67</text:p>
          </table:table-cell>
          <table:table-cell table:style-name="ce290" table:formula="of:=((([.Q23]+1)*1.618)-(([.R23]+1)*1.618))/[.N23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62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62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3.236" calcext:value-type="float">
            <text:p>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62" table:formula="of:=SUM([.B26:.M26])/12" office:value-type="float" office:value="0.666666666666667" calcext:value-type="float">
            <text:p>0,67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6]" office:value-type="float" office:value="0.666666666666667" calcext:value-type="float">
            <text:p>0,67</text:p>
          </table:table-cell>
          <table:table-cell table:style-name="ce290" table:formula="of:=((([.Q26]+1)*1.618)-(([.R26]+1)*1.618))/[.N26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62" table:formula="of:=SUM([.B27:.M27])/12" office:value-type="float" office:value="0.666666666666667" calcext:value-type="float">
            <text:p>0,6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666666666666667" calcext:value-type="float">
            <text:p>0,67</text:p>
          </table:table-cell>
          <table:table-cell table:style-name="ce290" table:formula="of:=((([.Q27]+1)*1.618)-(([.R27]+1)*1.618))/[.N27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4" calcext:value-type="float">
            <text:p>14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4" calcext:value-type="float">
            <text:p>4</text:p>
          </table:table-cell>
          <table:table-cell table:style-name="ce296" table:formula="of:=SUM([.Q36:.AE3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38:.AE3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39:.AE39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4:.AE44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5:.AE4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4:.AE54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6:.AE5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7:.AE5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8:.AE5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3:.AE6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8:.AE68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5:.AE75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7:.AE7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1:.AE81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2:.AE8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3:.AE83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4:.AE84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6:.AE8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8:.AE8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9:.AE99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0:.AE100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4:.AE10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2:.AE11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2:.AE12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5:.AE12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9:.AE12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0:.AE13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4:.AE134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6:.AE13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9:.AE13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5:.AE14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8:.AE14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3:.AE15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4:.AE154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6:.AE15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7:.AE15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8:.AE15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9:.AE15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0:.AE16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1:.AE161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2:.AE162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4:.AE164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5:.AE16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1:.AE171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4:.AE17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7:.AE17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8:.AE178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9:.AE17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0:.AE180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1:.AE181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2:.AE18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3:.AE183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4:.AE184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1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5:07:34.619172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42</meta:editing-cycles>
    <meta:creation-date>2025-05-07T18:30:17</meta:creation-date>
    <dc:date>2026-06-20T22:19:47.934934500</dc:date>
    <dc:language>pt-BR</dc:language>
    <meta:editing-duration>P6DT9H29M23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957" meta:object-count="0"/>
    <meta:user-defined meta:name="AppVersion">16.0300</meta:user-defined>
  </office:meta>
</office:document-meta>
</file>