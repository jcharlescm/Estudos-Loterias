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1" calcext:value-type="float">
            <text:p>3701</text:p>
          </table:table-cell>
          <table:table-cell table:style-name="ce272" office:value-type="float" office:value="3702" calcext:value-type="float">
            <text:p>3702</text:p>
          </table:table-cell>
          <table:table-cell table:style-name="ce272" office:value-type="float" office:value="3703" calcext:value-type="float">
            <text:p>3703</text:p>
          </table:table-cell>
          <table:table-cell table:style-name="ce272" office:value-type="float" office:value="3704" calcext:value-type="float">
            <text:p>3704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3:.M3])/12" office:value-type="float" office:value="0.916666666666667" calcext:value-type="float">
            <text:p>0,92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9" calcext:value-type="float">
            <text:p>9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916666666666667" calcext:value-type="float">
            <text:p>0,92</text:p>
          </table:table-cell>
          <table:table-cell table:style-name="ce290" table:formula="of:=((([.Q3]+1)*1.618)-(([.R3]+1)*1.618))/[.N3]" office:value-type="float" office:value="15.8858181818182" calcext:value-type="float">
            <text:p>15,8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-7.7664" calcext:value-type="float">
            <text:p>-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5:.M5])/12" office:value-type="float" office:value="0.583333333333333" calcext:value-type="float">
            <text:p>0,58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83333333333333" calcext:value-type="float">
            <text:p>0,58</text:p>
          </table:table-cell>
          <table:table-cell table:style-name="ce290" table:formula="of:=((([.Q5]+1)*1.618)-(([.R5]+1)*1.618))/[.N5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6:.M6])/12" office:value-type="float" office:value="0.666666666666667" calcext:value-type="float">
            <text:p>0,67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666666666666667" calcext:value-type="float">
            <text:p>0,67</text:p>
          </table:table-cell>
          <table:table-cell table:style-name="ce290" table:formula="of:=((([.Q6]+1)*1.618)-(([.R6]+1)*1.618))/[.N6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7:.M7])/12" office:value-type="float" office:value="0.416666666666667" calcext:value-type="float">
            <text:p>0,42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7]" office:value-type="float" office:value="0.416666666666667" calcext:value-type="float">
            <text:p>0,42</text:p>
          </table:table-cell>
          <table:table-cell table:style-name="ce290" table:formula="of:=((([.Q7]+1)*1.618)-(([.R7]+1)*1.618))/[.N7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8:.M8])/12" office:value-type="float" office:value="0.583333333333333" calcext:value-type="float">
            <text:p>0,58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583333333333333" calcext:value-type="float">
            <text:p>0,58</text:p>
          </table:table-cell>
          <table:table-cell table:style-name="ce290" table:formula="of:=((([.Q8]+1)*1.618)-(([.R8]+1)*1.618))/[.N8]" office:value-type="float" office:value="13.8685714285714" calcext:value-type="float">
            <text:p>13,8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-14.562" calcext:value-type="float">
            <text:p>-14,5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583333333333333" calcext:value-type="float">
            <text:p>0,58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0]" office:value-type="float" office:value="0.583333333333333" calcext:value-type="float">
            <text:p>0,58</text:p>
          </table:table-cell>
          <table:table-cell table:style-name="ce290" table:formula="of:=((([.Q10]+1)*1.618)-(([.R10]+1)*1.618))/[.N10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1:.M11])/12" office:value-type="float" office:value="0.833333333333333" calcext:value-type="float">
            <text:p>0,83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1]" office:value-type="float" office:value="0.833333333333333" calcext:value-type="float">
            <text:p>0,83</text:p>
          </table:table-cell>
          <table:table-cell table:style-name="ce290" table:formula="of:=((([.Q11]+1)*1.618)-(([.R11]+1)*1.618))/[.N11]" office:value-type="float" office:value="-1.9416" calcext:value-type="float">
            <text:p>-1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2:.M12])/12" office:value-type="float" office:value="0.666666666666667" calcext:value-type="float">
            <text:p>0,67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2]" office:value-type="float" office:value="0.666666666666667" calcext:value-type="float">
            <text:p>0,67</text:p>
          </table:table-cell>
          <table:table-cell table:style-name="ce290" table:formula="of:=((([.Q12]+1)*1.618)-(([.R12]+1)*1.618))/[.N12]" office:value-type="float" office:value="-2.427" calcext:value-type="float">
            <text:p>-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13:.M13])/12" office:value-type="float" office:value="0.166666666666667" calcext:value-type="float">
            <text:p>0,17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3]" office:value-type="float" office:value="0.166666666666667" calcext:value-type="float">
            <text:p>0,17</text:p>
          </table:table-cell>
          <table:table-cell table:style-name="ce290" table:formula="of:=((([.Q13]+1)*1.618)-(([.R13]+1)*1.618))/[.N13]" office:value-type="float" office:value="-29.124" calcext:value-type="float">
            <text:p>-29,1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4:.M14])/12" office:value-type="float" office:value="0.416666666666667" calcext:value-type="float">
            <text:p>0,42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4]" office:value-type="float" office:value="0.416666666666667" calcext:value-type="float">
            <text:p>0,42</text:p>
          </table:table-cell>
          <table:table-cell table:style-name="ce290" table:formula="of:=((([.Q14]+1)*1.618)-(([.R14]+1)*1.618))/[.N14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table:formula="of:=SUM([.B15:.M15])/12" office:value-type="float" office:value="0.583333333333333" calcext:value-type="float">
            <text:p>0,58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5]" office:value-type="float" office:value="0.583333333333333" calcext:value-type="float">
            <text:p>0,58</text:p>
          </table:table-cell>
          <table:table-cell table:style-name="ce290" table:formula="of:=((([.Q15]+1)*1.618)-(([.R15]+1)*1.618))/[.N15]" office:value-type="float" office:value="8.32114285714286" calcext:value-type="float">
            <text:p>8,32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7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6:.M16])/12" office:value-type="float" office:value="0.833333333333333" calcext:value-type="float">
            <text:p>0,83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833333333333333" calcext:value-type="float">
            <text:p>0,83</text:p>
          </table:table-cell>
          <table:table-cell table:style-name="ce290" table:formula="of:=((([.Q16]+1)*1.618)-(([.R16]+1)*1.618))/[.N16]" office:value-type="float" office:value="1.9416" calcext:value-type="float">
            <text:p>1,9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17:.M17])/12" office:value-type="float" office:value="0.75" calcext:value-type="float">
            <text:p>0,75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75" calcext:value-type="float">
            <text:p>0,75</text:p>
          </table:table-cell>
          <table:table-cell table:style-name="ce290" table:formula="of:=((([.Q17]+1)*1.618)-(([.R17]+1)*1.618))/[.N17]" office:value-type="float" office:value="8.62933333333333" calcext:value-type="float">
            <text:p>8,6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8.32114285714286" calcext:value-type="float">
            <text:p>8,3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9:.M19])/12" office:value-type="float" office:value="0.5" calcext:value-type="float">
            <text:p>0,50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9]" office:value-type="float" office:value="0.5" calcext:value-type="float">
            <text:p>0,50</text:p>
          </table:table-cell>
          <table:table-cell table:style-name="ce290" table:formula="of:=((([.Q19]+1)*1.618)-(([.R19]+1)*1.618))/[.N19]" office:value-type="float" office:value="-3.236" calcext:value-type="float">
            <text:p>-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1:.M21])/12" office:value-type="float" office:value="0.333333333333333" calcext:value-type="float">
            <text:p>0,33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333333333333333" calcext:value-type="float">
            <text:p>0,33</text:p>
          </table:table-cell>
          <table:table-cell table:style-name="ce290" table:formula="of:=((([.Q21]+1)*1.618)-(([.R21]+1)*1.618))/[.N21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2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5.54742857142857" calcext:value-type="float">
            <text:p>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2" table:formula="of:=SUM([.B24:.M24])/12" office:value-type="float" office:value="0.75" calcext:value-type="float">
            <text:p>0,75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75" calcext:value-type="float">
            <text:p>0,75</text:p>
          </table:table-cell>
          <table:table-cell table:style-name="ce290" table:formula="of:=((([.Q24]+1)*1.618)-(([.R24]+1)*1.618))/[.N24]" office:value-type="float" office:value="4.31466666666667" calcext:value-type="float">
            <text:p>4,3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5:.M25])/12" office:value-type="float" office:value="0.666666666666667" calcext:value-type="float">
            <text:p>0,67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666666666666667" calcext:value-type="float">
            <text:p>0,67</text:p>
          </table:table-cell>
          <table:table-cell table:style-name="ce290" table:formula="of:=((([.Q25]+1)*1.618)-(([.R25]+1)*1.618))/[.N25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666666666666667" calcext:value-type="float">
            <text:p>0,67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6]" office:value-type="float" office:value="0.666666666666667" calcext:value-type="float">
            <text:p>0,67</text:p>
          </table:table-cell>
          <table:table-cell table:style-name="ce290" table:formula="of:=((([.Q26]+1)*1.618)-(([.R26]+1)*1.618))/[.N26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27:.M27])/12" office:value-type="float" office:value="0.833333333333333" calcext:value-type="float">
            <text:p>0,83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833333333333333" calcext:value-type="float">
            <text:p>0,83</text:p>
          </table:table-cell>
          <table:table-cell table:style-name="ce290" table:formula="of:=((([.Q27]+1)*1.618)-(([.R27]+1)*1.618))/[.N27]" office:value-type="float" office:value="7.7664" calcext:value-type="float">
            <text:p>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4" calcext:value-type="float">
            <text:p>14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0:.AE40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1:.AE4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0:.AE50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2:.AE5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3:.AE5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4:.AE5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9:.AE5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4:.AE64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6:.AE66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9:.AE6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0:.AE7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1:.AE71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3:.AE7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77:.AE77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8:.AE7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9:.AE79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0:.AE80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1:.AE8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2:.AE82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3:.AE83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4:.AE8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6:.AE8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7:.AE8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8:.AE8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9:.AE8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0:.AE9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2:.AE9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3:.AE9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4:.AE9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5:.AE95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6:.AE96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7:.AE9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9:.AE9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0:.AE10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8:.AE10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8:.AE11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1:.AE121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5:.AE12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6:.AE12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0:.AE13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2:.AE13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5:.AE13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6:.AE136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1:.AE14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2:.AE14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4:.AE14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5:.AE14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9:.AE14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0:.AE150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2:.AE152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3:.AE15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4:.AE154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5:.AE15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6:.AE15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57:.AE157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58:.AE158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9:.AE15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0:.AE16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1:.AE16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2:.AE162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4:.AE16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5:.AE16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7:.AE167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0:.AE17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1:.AE17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4:.AE174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5:.AE175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6:.AE176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7:.AE17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8:.AE17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79:.AE179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0:.AE180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1:.AE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2:.AE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5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11:07:13.10731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33</meta:editing-cycles>
    <meta:creation-date>2025-05-07T18:30:17</meta:creation-date>
    <dc:date>2026-06-17T11:15:35.865281600</dc:date>
    <dc:language>pt-BR</dc:language>
    <meta:editing-duration>P6DT11M18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889" meta:object-count="0"/>
    <meta:user-defined meta:name="AppVersion">16.0300</meta:user-defined>
  </office:meta>
</office:document-meta>
</file>