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0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127622" style:rotation-align="none"/>
    </style:style>
    <style:style style:name="ce118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4000" style:rotation-align="none"/>
    </style:style>
    <style:style style:name="ce120" style:family="table-cell" style:parent-style-name="Default">
      <style:table-cell-properties fo:background-color="#999999" style:rotation-align="none"/>
    </style:style>
    <style:style style:name="ce121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5" style:family="table-cell" style:parent-style-name="Default">
      <style:table-cell-properties fo:background-color="#eeeee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123">
      <style:table-cell-properties style:rotation-align="none"/>
    </style:style>
    <style:style style:name="ce1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7" style:family="table-cell" style:parent-style-name="Default">
      <style:table-cell-properties style:diagonal-bl-tr="none" style:diagonal-tl-br="none" fo:border="0.74pt solid #000000" style:rotation-align="none"/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3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="0.74pt solid #000000"/>
    </style:style>
    <style:style style:name="ce1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O3"/>
      <style:map style:condition="cell-content-is-between(0.71,0.9)" style:apply-style-name="ConditionalStyle_5f_4" style:base-cell-address="'Analise-Facil'.O3"/>
      <style:map style:condition="cell-content-is-between(0.56,0.7)" style:apply-style-name="ConditionalStyle_5f_3" style:base-cell-address="'Analise-Facil'.O3"/>
      <style:map style:condition="cell-content-is-between(0.4,0.55)" style:apply-style-name="ConditionalStyle_5f_2" style:base-cell-address="'Analise-Facil'.O3"/>
      <style:map style:condition="cell-content()&lt;0.4" style:apply-style-name="ConditionalStyle_5f_1" style:base-cell-address="'Analise-Facil'.O3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2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5" style:family="table-cell" style:parent-style-name="Default">
      <style:text-properties fo:font-size="20pt" style:font-size-asian="20pt" style:font-size-complex="2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7" style:family="table-cell" style:parent-style-name="Default">
      <style:text-properties style:font-name="Arial Black" fo:font-size="16pt" style:font-size-asian="16pt" style:font-size-complex="16pt"/>
    </style:style>
    <style:style style:name="ce248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4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O3"/>
      <style:map style:condition="cell-content-is-between(0.71,0.9)" style:apply-style-name="ConditionalStyle_5f_4" style:base-cell-address="'Analise-Facil'.O3"/>
      <style:map style:condition="cell-content-is-between(0.56,0.7)" style:apply-style-name="ConditionalStyle_5f_3" style:base-cell-address="'Analise-Facil'.O3"/>
      <style:map style:condition="cell-content-is-between(0.4,0.55)" style:apply-style-name="ConditionalStyle_5f_2" style:base-cell-address="'Analise-Facil'.O3"/>
      <style:map style:condition="cell-content()&lt;0.4" style:apply-style-name="ConditionalStyle_5f_1" style:base-cell-address="'Analise-Facil'.O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272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697" calcext:value-type="float">
            <text:p>3697</text:p>
          </table:table-cell>
          <table:table-cell table:style-name="ce272" office:value-type="float" office:value="3698" calcext:value-type="float">
            <text:p>3698</text:p>
          </table:table-cell>
          <table:table-cell table:style-name="ce272" office:value-type="float" office:value="3699" calcext:value-type="float">
            <text:p>3699</text:p>
          </table:table-cell>
          <table:table-cell table:style-name="ce272" office:value-type="float" office:value="3700" calcext:value-type="float">
            <text:p>3700</text:p>
          </table:table-cell>
          <table:table-cell table:style-name="ce272" office:value-type="float" office:value="3701" calcext:value-type="float">
            <text:p>3701</text:p>
          </table:table-cell>
          <table:table-cell table:style-name="ce272" office:value-type="float" office:value="3702" calcext:value-type="float">
            <text:p>3702</text:p>
          </table:table-cell>
          <table:table-cell table:style-name="ce272" office:value-type="float" office:value="3703" calcext:value-type="float">
            <text:p>3703</text:p>
          </table:table-cell>
          <table:table-cell table:style-name="ce272" office:value-type="float" office:value="3704" calcext:value-type="float">
            <text:p>3704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style-name="ce275" table:formula="of:=SUM([.B3:.N3])/13" office:value-type="float" office:value="0.923076923076923" calcext:value-type="float">
            <text:p>0,92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3]" office:value-type="float" office:value="0.923076923076923" calcext:value-type="float">
            <text:p>0,92</text:p>
          </table:table-cell>
          <table:table-cell table:style-name="ce290" table:formula="of:=((([.R3]+1)*1.618)-(([.S3]+1)*1.618))/[.O3]" office:value-type="float" office:value="10.517" calcext:value-type="float">
            <text:p>10,5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275" table:formula="of:=SUM([.B4:.N4])/13" office:value-type="float" office:value="0.384615384615385" calcext:value-type="float">
            <text:p>0,38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O4]" office:value-type="float" office:value="0.384615384615385" calcext:value-type="float">
            <text:p>0,38</text:p>
          </table:table-cell>
          <table:table-cell table:style-name="ce290" table:formula="of:=((([.R4]+1)*1.618)-(([.S4]+1)*1.618))/[.O4]" office:value-type="float" office:value="-4.2068" calcext:value-type="float">
            <text:p>-4,2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275" table:formula="of:=SUM([.B5:.N5])/13" office:value-type="float" office:value="0.615384615384615" calcext:value-type="float">
            <text:p>0,62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O5]" office:value-type="float" office:value="0.615384615384615" calcext:value-type="float">
            <text:p>0,62</text:p>
          </table:table-cell>
          <table:table-cell table:style-name="ce290" table:formula="of:=((([.R5]+1)*1.618)-(([.S5]+1)*1.618))/[.O5]" office:value-type="float" office:value="-5.2585" calcext:value-type="float">
            <text:p>-5,2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275" table:formula="of:=SUM([.B6:.N6])/13" office:value-type="float" office:value="0.461538461538462" calcext:value-type="float">
            <text:p>0,46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6]" office:value-type="float" office:value="0.461538461538462" calcext:value-type="float">
            <text:p>0,46</text:p>
          </table:table-cell>
          <table:table-cell table:style-name="ce290" table:formula="of:=((([.R6]+1)*1.618)-(([.S6]+1)*1.618))/[.O6]" office:value-type="float" office:value="7.01133333333333" calcext:value-type="float">
            <text:p>7,0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275" table:formula="of:=SUM([.B7:.N7])/13" office:value-type="float" office:value="0.461538461538462" calcext:value-type="float">
            <text:p>0,46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O7]" office:value-type="float" office:value="0.461538461538462" calcext:value-type="float">
            <text:p>0,46</text:p>
          </table:table-cell>
          <table:table-cell table:style-name="ce290" table:formula="of:=((([.R7]+1)*1.618)-(([.S7]+1)*1.618))/[.O7]" office:value-type="float" office:value="-3.50566666666667" calcext:value-type="float">
            <text:p>-3,5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275" table:formula="of:=SUM([.B8:.N8])/13" office:value-type="float" office:value="0.538461538461538" calcext:value-type="float">
            <text:p>0,54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number-columns-repeated="2" table:style-name="ce287" office:value-type="float" office:value="2" calcext:value-type="float">
            <text:p>2,00</text:p>
          </table:table-cell>
          <table:table-cell table:style-name="ce287" table:formula="of:=[.O8]" office:value-type="float" office:value="0.538461538461538" calcext:value-type="float">
            <text:p>0,54</text:p>
          </table:table-cell>
          <table:table-cell table:style-name="ce290" table:formula="of:=((([.R8]+1)*1.618)-(([.S8]+1)*1.618))/[.O8]" office:value-type="float" office:value="0" calcext:value-type="float">
            <text:p>0,0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5" table:formula="of:=SUM([.B9:.N9])/13" office:value-type="float" office:value="0.538461538461538" calcext:value-type="float">
            <text:p>0,54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number-columns-repeated="2" table:style-name="ce287" office:value-type="float" office:value="1" calcext:value-type="float">
            <text:p>1,00</text:p>
          </table:table-cell>
          <table:table-cell table:style-name="ce287" table:formula="of:=[.O9]" office:value-type="float" office:value="0.538461538461538" calcext:value-type="float">
            <text:p>0,54</text:p>
          </table:table-cell>
          <table:table-cell table:style-name="ce290" table:formula="of:=((([.R9]+1)*1.618)-(([.S9]+1)*1.618))/[.O9]" office:value-type="float" office:value="0" calcext:value-type="float">
            <text:p>0,0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275" table:formula="of:=SUM([.B10:.N10])/13" office:value-type="float" office:value="0.692307692307692" calcext:value-type="float">
            <text:p>0,69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number-columns-repeated="2" table:style-name="ce287" office:value-type="float" office:value="0" calcext:value-type="float">
            <text:p>0,00</text:p>
          </table:table-cell>
          <table:table-cell table:style-name="ce287" table:formula="of:=[.O10]" office:value-type="float" office:value="0.692307692307692" calcext:value-type="float">
            <text:p>0,69</text:p>
          </table:table-cell>
          <table:table-cell table:style-name="ce290" table:formula="of:=((([.R10]+1)*1.618)-(([.S10]+1)*1.618))/[.O10]" office:value-type="float" office:value="0" calcext:value-type="float">
            <text:p>0,0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8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275" table:formula="of:=SUM([.B11:.N11])/13" office:value-type="float" office:value="0.923076923076923" calcext:value-type="float">
            <text:p>0,92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11]" office:value-type="float" office:value="0.923076923076923" calcext:value-type="float">
            <text:p>0,92</text:p>
          </table:table-cell>
          <table:table-cell table:style-name="ce290" table:formula="of:=((([.R11]+1)*1.618)-(([.S11]+1)*1.618))/[.O11]" office:value-type="float" office:value="7.01133333333333" calcext:value-type="float">
            <text:p>7,0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5" table:formula="of:=SUM([.B12:.N12])/13" office:value-type="float" office:value="0.769230769230769" calcext:value-type="float">
            <text:p>0,77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12]" office:value-type="float" office:value="0.769230769230769" calcext:value-type="float">
            <text:p>0,77</text:p>
          </table:table-cell>
          <table:table-cell table:style-name="ce290" table:formula="of:=((([.R12]+1)*1.618)-(([.S12]+1)*1.618))/[.O12]" office:value-type="float" office:value="2.1034" calcext:value-type="float">
            <text:p>2,1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5" table:formula="of:=SUM([.B13:.N13])/13" office:value-type="float" office:value="0.230769230769231" calcext:value-type="float">
            <text:p>0,23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13]" office:value-type="float" office:value="0.230769230769231" calcext:value-type="float">
            <text:p>0,23</text:p>
          </table:table-cell>
          <table:table-cell table:style-name="ce290" table:formula="of:=((([.R13]+1)*1.618)-(([.S13]+1)*1.618))/[.O13]" office:value-type="float" office:value="7.01133333333333" calcext:value-type="float">
            <text:p>7,0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275" table:formula="of:=SUM([.B14:.N14])/13" office:value-type="float" office:value="0.384615384615385" calcext:value-type="float">
            <text:p>0,38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O14]" office:value-type="float" office:value="0.384615384615385" calcext:value-type="float">
            <text:p>0,38</text:p>
          </table:table-cell>
          <table:table-cell table:style-name="ce290" table:formula="of:=((([.R14]+1)*1.618)-(([.S14]+1)*1.618))/[.O14]" office:value-type="float" office:value="-4.2068" calcext:value-type="float">
            <text:p>-4,2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275" table:formula="of:=SUM([.B15:.N15])/13" office:value-type="float" office:value="0.538461538461538" calcext:value-type="float">
            <text:p>0,54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O15]" office:value-type="float" office:value="0.538461538461538" calcext:value-type="float">
            <text:p>0,54</text:p>
          </table:table-cell>
          <table:table-cell table:style-name="ce290" table:formula="of:=((([.R15]+1)*1.618)-(([.S15]+1)*1.618))/[.O15]" office:value-type="float" office:value="-6.00971428571429" calcext:value-type="float">
            <text:p>-6,01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8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5" table:formula="of:=SUM([.B16:.N16])/13" office:value-type="float" office:value="0.769230769230769" calcext:value-type="float">
            <text:p>0,77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16]" office:value-type="float" office:value="0.769230769230769" calcext:value-type="float">
            <text:p>0,77</text:p>
          </table:table-cell>
          <table:table-cell table:style-name="ce290" table:formula="of:=((([.R16]+1)*1.618)-(([.S16]+1)*1.618))/[.O16]" office:value-type="float" office:value="2.1034" calcext:value-type="float">
            <text:p>2,10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5" table:formula="of:=SUM([.B17:.N17])/13" office:value-type="float" office:value="0.538461538461538" calcext:value-type="float">
            <text:p>0,54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17]" office:value-type="float" office:value="0.538461538461538" calcext:value-type="float">
            <text:p>0,54</text:p>
          </table:table-cell>
          <table:table-cell table:style-name="ce290" table:formula="of:=((([.R17]+1)*1.618)-(([.S17]+1)*1.618))/[.O17]" office:value-type="float" office:value="3.00485714285714" calcext:value-type="float">
            <text:p>3,00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275" table:formula="of:=SUM([.B18:.N18])/13" office:value-type="float" office:value="0.384615384615385" calcext:value-type="float">
            <text:p>0,3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O18]" office:value-type="float" office:value="0.384615384615385" calcext:value-type="float">
            <text:p>0,38</text:p>
          </table:table-cell>
          <table:table-cell table:style-name="ce290" table:formula="of:=((([.R18]+1)*1.618)-(([.S18]+1)*1.618))/[.O18]" office:value-type="float" office:value="-4.2068" calcext:value-type="float">
            <text:p>-4,2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275" table:formula="of:=SUM([.B19:.N19])/13" office:value-type="float" office:value="0.461538461538462" calcext:value-type="float">
            <text:p>0,46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O19]" office:value-type="float" office:value="0.461538461538462" calcext:value-type="float">
            <text:p>0,46</text:p>
          </table:table-cell>
          <table:table-cell table:style-name="ce290" table:formula="of:=((([.R19]+1)*1.618)-(([.S19]+1)*1.618))/[.O19]" office:value-type="float" office:value="-3.50566666666667" calcext:value-type="float">
            <text:p>-3,5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275" table:formula="of:=SUM([.B20:.N20])/13" office:value-type="float" office:value="0.769230769230769" calcext:value-type="float">
            <text:p>0,7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20]" office:value-type="float" office:value="0.769230769230769" calcext:value-type="float">
            <text:p>0,77</text:p>
          </table:table-cell>
          <table:table-cell table:style-name="ce290" table:formula="of:=((([.R20]+1)*1.618)-(([.S20]+1)*1.618))/[.O20]" office:value-type="float" office:value="10.517" calcext:value-type="float">
            <text:p>10,5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275" table:formula="of:=SUM([.B21:.N21])/13" office:value-type="float" office:value="0.384615384615385" calcext:value-type="float">
            <text:p>0,38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21]" office:value-type="float" office:value="0.384615384615385" calcext:value-type="float">
            <text:p>0,38</text:p>
          </table:table-cell>
          <table:table-cell table:style-name="ce290" table:formula="of:=((([.R21]+1)*1.618)-(([.S21]+1)*1.618))/[.O21]" office:value-type="float" office:value="8.4136" calcext:value-type="float">
            <text:p>8,4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5" table:formula="of:=SUM([.B22:.N22])/13" office:value-type="float" office:value="0.692307692307692" calcext:value-type="float">
            <text:p>0,69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22]" office:value-type="float" office:value="0.692307692307692" calcext:value-type="float">
            <text:p>0,69</text:p>
          </table:table-cell>
          <table:table-cell table:style-name="ce290" table:formula="of:=((([.R22]+1)*1.618)-(([.S22]+1)*1.618))/[.O22]" office:value-type="float" office:value="2.33711111111111" calcext:value-type="float">
            <text:p>2,3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275" table:formula="of:=SUM([.B23:.N23])/13" office:value-type="float" office:value="0.692307692307692" calcext:value-type="float">
            <text:p>0,69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O23]" office:value-type="float" office:value="0.692307692307692" calcext:value-type="float">
            <text:p>0,69</text:p>
          </table:table-cell>
          <table:table-cell table:style-name="ce290" table:formula="of:=((([.R23]+1)*1.618)-(([.S23]+1)*1.618))/[.O23]" office:value-type="float" office:value="-2.33711111111111" calcext:value-type="float">
            <text:p>-2,3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275" table:formula="of:=SUM([.B24:.N24])/13" office:value-type="float" office:value="0.615384615384615" calcext:value-type="float">
            <text:p>0,62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O24]" office:value-type="float" office:value="0.615384615384615" calcext:value-type="float">
            <text:p>0,62</text:p>
          </table:table-cell>
          <table:table-cell table:style-name="ce290" table:formula="of:=((([.R24]+1)*1.618)-(([.S24]+1)*1.618))/[.O24]" office:value-type="float" office:value="-5.2585" calcext:value-type="float">
            <text:p>-5,2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275" table:formula="of:=SUM([.B25:.N25])/13" office:value-type="float" office:value="0.692307692307692" calcext:value-type="float">
            <text:p>0,69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25]" office:value-type="float" office:value="0.692307692307692" calcext:value-type="float">
            <text:p>0,69</text:p>
          </table:table-cell>
          <table:table-cell table:style-name="ce290" table:formula="of:=((([.R25]+1)*1.618)-(([.S25]+1)*1.618))/[.O25]" office:value-type="float" office:value="7.01133333333333" calcext:value-type="float">
            <text:p>7,0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275" table:formula="of:=SUM([.B26:.N26])/13" office:value-type="float" office:value="0.692307692307692" calcext:value-type="float">
            <text:p>0,69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26]" office:value-type="float" office:value="0.692307692307692" calcext:value-type="float">
            <text:p>0,69</text:p>
          </table:table-cell>
          <table:table-cell table:style-name="ce290" table:formula="of:=((([.R26]+1)*1.618)-(([.S26]+1)*1.618))/[.O26]" office:value-type="float" office:value="14.0226666666667" calcext:value-type="float">
            <text:p>14,0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5" table:formula="of:=SUM([.B27:.N27])/13" office:value-type="float" office:value="0.769230769230769" calcext:value-type="float">
            <text:p>0,77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O27]" office:value-type="float" office:value="0.769230769230769" calcext:value-type="float">
            <text:p>0,77</text:p>
          </table:table-cell>
          <table:table-cell table:style-name="ce290" table:formula="of:=((([.R27]+1)*1.618)-(([.S27]+1)*1.618))/[.O27]" office:value-type="float" office:value="2.1034" calcext:value-type="float">
            <text:p>2,1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4" calcext:value-type="float">
            <text:p>14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4" table:formula="of:=SUM([.N3:.N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table:style-name="ce172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4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6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36:.AF3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37:.AF3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38:.AF3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39:.AF3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40:.AF4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41:.AF41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42:.AF4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43:.AF4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44:.AF4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45:.AF4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46:.AF4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R47:.AF47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48:.AF48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49:.AF4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50:.AF5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51:.AF5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52:.AF5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53:.AF5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54:.AF54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55:.AF5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R56:.AF5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57:.AF5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58:.AF5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59:.AF5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60:.AF6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R61:.AF61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62:.AF6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63:.AF63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64:.AF6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65:.AF65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66:.AF6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67:.AF6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68:.AF68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69:.AF69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70:.AF7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71:.AF71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72:.AF7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73:.AF73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R74:.AF74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75:.AF7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76:.AF76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77:.AF77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78:.AF78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R79:.AF7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80:.AF8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R81:.AF8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82:.AF8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83:.AF8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84:.AF8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85:.AF8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86:.AF8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87:.AF8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88:.AF88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89:.AF8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90:.AF9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91:.AF9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R92:.AF92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93:.AF93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94:.AF9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95:.AF9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96:.AF9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R97:.AF9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98:.AF98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99:.AF9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0:.AF10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1:.AF10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2:.AF10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3:.AF103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4:.AF10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05:.AF10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6:.AF10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7:.AF10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8:.AF10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09:.AF10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10:.AF110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11:.AF11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12:.AF11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13:.AF113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14:.AF11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15:.AF11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16:.AF116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17:.AF11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R118:.AF11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19:.AF11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20:.AF12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21:.AF12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22:.AF12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R123:.AF12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24:.AF124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25:.AF12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26:.AF126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27:.AF12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28:.AF12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29:.AF12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30:.AF13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31:.AF13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R132:.AF13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33:.AF133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34:.AF134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35:.AF13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36:.AF13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37:.AF137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R138:.AF13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39:.AF13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40:.AF140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41:.AF14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42:.AF14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43:.AF14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44:.AF144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45:.AF14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46:.AF14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R147:.AF147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R148:.AF14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R149:.AF14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R150:.AF15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R151:.AF15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R152:.AF15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53:.AF15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R154:.AF154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R155:.AF155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56:.AF15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R157:.AF15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R158:.AF15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6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59:.AF159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6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60:.AF160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61:.AF16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62:.AF16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63:.AF16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R164:.AF164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65:.AF165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66:.AF16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R167:.AF16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68:.AF16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69:.AF169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R170:.AF17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R171:.AF171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R172:.AF17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R173:.AF173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R174:.AF17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R175:.AF17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R176:.AF176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R177:.AF177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78:.AF17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79:.AF17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80:.AF18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81:.AF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82:.AF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83:.AF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84:.AF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85:.AF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86:.AF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97" table:formula="of:=SUM([.R187:.AF187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8">
          <table:table-cell table:number-columns-repeated="45"/>
        </table:table-row>
        <table:table-row table:style-name="ro2">
          <table:table-cell table:number-columns-repeated="45"/>
        </table:table-row>
        <calcext:conditional-formats>
          <calcext:conditional-format calcext:target-range-address="'Analise-Facil'.O3:'Analise-Facil'.O27">
            <calcext:condition calcext:apply-style-name="ConditionalStyle_5" calcext:value="&gt;0.9" calcext:base-cell-address="'Analise-Facil'.O3"/>
            <calcext:condition calcext:apply-style-name="ConditionalStyle_4" calcext:value="between(0.71,0.9)" calcext:base-cell-address="'Analise-Facil'.O3"/>
            <calcext:condition calcext:apply-style-name="ConditionalStyle_3" calcext:value="between(0.56,0.7)" calcext:base-cell-address="'Analise-Facil'.O3"/>
            <calcext:condition calcext:apply-style-name="ConditionalStyle_2" calcext:value="between(0.4,0.55)" calcext:base-cell-address="'Analise-Facil'.O3"/>
            <calcext:condition calcext:apply-style-name="ConditionalStyle_1" calcext:value="&lt;0.4" calcext:base-cell-address="'Analise-Facil'.O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 style:data-style-name="N2" text:time-value="09:34:20.62175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19</meta:editing-cycles>
    <meta:creation-date>2025-05-07T18:30:17</meta:creation-date>
    <dc:date>2026-06-12T21:24:07.735476200</dc:date>
    <dc:language>pt-BR</dc:language>
    <meta:editing-duration>P5DT23H4M40S</meta:editing-duration>
    <meta:generator>LibreOffice/25.8.6.2$Windows_X86_64 LibreOffice_project/b4b39682cd9868fa725bc664aff94278d315bd04</meta:generator>
    <meta:print-date>2026-04-16T17:11:55.921000000</meta:print-date>
    <meta:document-statistic meta:table-count="7" meta:cell-count="5868" meta:object-count="0"/>
    <meta:user-defined meta:name="AppVersion">16.0300</meta:user-defined>
  </office:meta>
</office:document-meta>
</file>